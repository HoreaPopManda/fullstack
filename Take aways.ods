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0A000002DCF89927CE.png" manifest:media-type="image/png"/>
  <manifest:file-entry manifest:full-path="Pictures/100000010000030E0000027DE7109C32.png" manifest:media-type="image/png"/>
  <manifest:file-entry manifest:full-path="Pictures/10000001000003010000028E5A14C382.png" manifest:media-type="image/png"/>
  <manifest:file-entry manifest:full-path="Pictures/1000000100000332000000FEF9588B4F.png" manifest:media-type="image/png"/>
  <manifest:file-entry manifest:full-path="Pictures/10000001000001E2000001E7D1D733C4.png" manifest:media-type="image/png"/>
  <manifest:file-entry manifest:full-path="Pictures/10000001000003680000038C0E4153E3.png" manifest:media-type="image/png"/>
  <manifest:file-entry manifest:full-path="Pictures/10000001000002CC0000016B5C8AC0A2.png" manifest:media-type="image/png"/>
  <manifest:file-entry manifest:full-path="Pictures/10000001000002C900000148CC596526.png" manifest:media-type="image/png"/>
  <manifest:file-entry manifest:full-path="Pictures/10000001000002A7000001BCFA4F7A8B.png" manifest:media-type="image/png"/>
  <manifest:file-entry manifest:full-path="Pictures/1000000100000304000002D8E055EF69.png" manifest:media-type="image/png"/>
  <manifest:file-entry manifest:full-path="Pictures/10000001000003010000028E9E06D5BB.png" manifest:media-type="image/png"/>
  <manifest:file-entry manifest:full-path="Pictures/10000001000002FE000002142709121E.png" manifest:media-type="image/png"/>
  <manifest:file-entry manifest:full-path="Pictures/10000001000001E30000016B35C66A1C.png" manifest:media-type="image/png"/>
  <manifest:file-entry manifest:full-path="Pictures/100000010000030000000146AB2A39D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82cm"/>
    </style:style>
    <style:style style:name="co2" style:family="table-column">
      <style:table-column-properties fo:break-before="auto" style:column-width="11.73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867cm"/>
    </style:style>
    <style:style style:name="co5" style:family="table-column">
      <style:table-column-properties fo:break-before="auto" style:column-width="4.835cm"/>
    </style:style>
    <style:style style:name="co6" style:family="table-column">
      <style:table-column-properties fo:break-before="auto" style:column-width="11.996cm"/>
    </style:style>
    <style:style style:name="co7" style:family="table-column">
      <style:table-column-properties fo:break-before="auto" style:column-width="5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 Code Extens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SLint</text:p>
          </table:table-cell>
          <table:table-cell office:value-type="string" calcext:value-type="string">
            <text:p>npm init @eslint/config@latest</text:p>
          </table:table-cell>
        </table:table-row>
        <table:table-row table:style-name="ro1">
          <table:table-cell office:value-type="string" calcext:value-type="string">
            <text:p>prettier (code formater)</text:p>
          </table:table-cell>
          <table:table-cell office:value-type="string" calcext:value-type="string">
            <text:p>via vs code extension</text:p>
          </table:table-cell>
        </table:table-row>
      </table:table>
      <table:table table:name="React Dev Tools Browser" table:style-name="ta1">
        <table:table-column table:style-name="co4" table:default-cell-style-name="Default"/>
        <table:table-row table:style-name="ro1">
          <table:table-cell office:value-type="string" calcext:value-type="string">
            <text:p>shows up in the browse dev tools. Install from there</text:p>
          </table:table-cell>
        </table:table-row>
      </table:table>
      <table:table table:name="JS multi-threading" table:style-name="ta1">
        <table:table-column table:style-name="co3" table:number-columns-repeated="6" table:default-cell-style-name="Default"/>
        <table:table-row table:style-name="ro1">
          <table:table-cell>
            <draw:frame draw:z-index="1" draw:name="Image 2" draw:style-name="gr1" draw:text-style-name="P1" svg:width="9.08cm" svg:height="8.851cm" svg:x="0.585cm" svg:y="0cm">
              <draw:image xlink:href="Pictures/10000001000001E2000001E7D1D733C4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0" draw:name="Image 1" draw:style-name="gr1" draw:text-style-name="P1" svg:width="14.505cm" svg:height="11.399cm" svg:x="0.309cm" svg:y="0.133cm">
              <draw:image xlink:href="Pictures/100000010000030E0000027DE7109C3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9">
          <table:table-cell table:number-columns-repeated="6"/>
        </table:table-row>
        <table:table-row table:style-name="ro1">
          <table:table-cell>
            <draw:frame draw:z-index="2" draw:name="Image 3" draw:style-name="gr1" draw:text-style-name="P1" svg:width="11.081cm" svg:height="4.917cm" svg:x="0.309cm" svg:y="0.179cm">
              <draw:image xlink:href="Pictures/10000001000002C900000148CC596526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>
            <text:p>array </text:p>
          </table:table-cell>
          <table:table-cell office:value-type="string" calcext:value-type="string">
            <text:p>push vs Concat</text:p>
          </table:table-cell>
          <table:table-cell/>
          <table:table-cell office:value-type="string" calcext:value-type="string">
            <text:p>push mutates</text:p>
          </table:table-cell>
          <table:table-cell office:value-type="string" calcext:value-type="string">
            <text:p>concat does not mutate</text:p>
          </table:table-cell>
          <table:table-cell/>
        </table:table-row>
      </table:table>
      <table:table table:name="===" table:style-name="ta1">
        <table:table-column table:style-name="co3" table:default-cell-style-name="Default"/>
        <table:table-row table:style-name="ro1">
          <table:table-cell>
            <draw:frame draw:z-index="0" draw:name="Image 4" draw:style-name="gr1" draw:text-style-name="P1" svg:width="11.663cm" svg:height="7.358cm" svg:x="0.308cm" svg:y="0.081cm">
              <draw:image xlink:href="Pictures/10000001000002A7000001BCFA4F7A8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Sheet5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>
            <draw:frame draw:z-index="0" draw:name="Image 5" draw:style-name="gr1" draw:text-style-name="P1" svg:width="12.296cm" svg:height="5.609cm" svg:x="0.309cm" svg:y="0.322cm">
              <draw:image xlink:href="Pictures/10000001000002CC0000016B5C8AC0A2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repl" table:style-name="ta1">
        <table:table-column table:style-name="co3" table:default-cell-style-name="Default"/>
        <table:table-row table:style-name="ro1">
          <table:table-cell>
            <draw:frame draw:z-index="0" draw:name="Image 12" draw:style-name="gr1" draw:text-style-name="P1" svg:width="22.522cm" svg:height="6.746cm" svg:x="0cm" svg:y="0cm">
              <draw:image xlink:href="Pictures/1000000100000332000000FEF9588B4F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tools" table:style-name="ta1">
        <table:table-column table:style-name="co5" table:default-cell-style-name="Default"/>
        <table:table-row table:style-name="ro1">
          <table:table-cell office:value-type="string" calcext:value-type="string">
            <text:p>axios</text:p>
          </table:table-cell>
        </table:table-row>
        <table:table-row table:style-name="ro1">
          <table:table-cell office:value-type="string" calcext:value-type="string">
            <text:p>express</text:p>
          </table:table-cell>
        </table:table-row>
        <table:table-row table:style-name="ro1">
          <table:table-cell office:value-type="string" calcext:value-type="string">
            <text:p>cors</text:p>
          </table:table-cell>
        </table:table-row>
        <table:table-row table:style-name="ro1">
          <table:table-cell office:value-type="string" calcext:value-type="string">
            <text:p>morgan</text:p>
          </table:table-cell>
        </table:table-row>
        <table:table-row table:style-name="ro1">
          <table:table-cell office:value-type="string" calcext:value-type="string">
            <text:p>render</text:p>
          </table:table-cell>
        </table:table-row>
        <table:table-row table:style-name="ro1">
          <table:table-cell office:value-type="string" calcext:value-type="string">
            <text:p>vite.config</text:p>
          </table:table-cell>
        </table:table-row>
        <table:table-row table:style-name="ro1">
          <table:table-cell office:value-type="string" calcext:value-type="string">
            <text:p>proxy</text:p>
          </table:table-cell>
        </table:table-row>
        <table:table-row table:style-name="ro1">
          <table:table-cell office:value-type="string" calcext:value-type="string">
            <text:p>app.use(express.static('dist'))</text:p>
          </table:table-cell>
        </table:table-row>
        <table:table-row table:style-name="ro2">
          <table:table-cell table:style-name="ce1" office:value-type="string" calcext:value-type="string">
            <text:p>error-tracking system like <text:a xlink:href="https://sentry.io/welcome/" xlink:type="simple">Sentry</text:a></text:p>
          </table:table-cell>
        </table:table-row>
      </table:table>
      <table:table table:name="destructuring" table:style-name="ta1">
        <table:table-column table:style-name="co3" table:default-cell-style-name="Default"/>
        <table:table-row table:style-name="ro1">
          <table:table-cell>
            <draw:frame draw:z-index="0" draw:name="Image 6" draw:style-name="gr1" draw:text-style-name="P1" svg:width="17.97cm" svg:height="18.052cm" svg:x="0.666cm" svg:y="0.155cm">
              <draw:image xlink:href="Pictures/10000001000003680000038C0E4153E3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ebugging" table:style-name="ta1">
        <table:table-column table:style-name="co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ode --inspect index.js</text:p>
          </table:table-cell>
        </table:table-row>
      </table:table>
      <table:table table:name="mongoose" table:style-name="ta1">
        <table:table-column table:style-name="co3" table:number-columns-repeated="6" table:default-cell-style-name="Default"/>
        <table:table-row table:style-name="ro1">
          <table:table-cell>
            <draw:frame draw:z-index="0" draw:name="Image 7" draw:style-name="gr1" draw:text-style-name="P1" svg:width="13.563cm" svg:height="12.339cm" svg:x="0.081cm" svg:y="0.03cm">
              <draw:image xlink:href="Pictures/1000000100000304000002D8E055EF69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" draw:name="Image 8" draw:style-name="gr1" draw:text-style-name="P1" svg:width="13.171cm" svg:height="10.807cm" svg:x="2.039cm" svg:y="0.259cm">
              <draw:image xlink:href="Pictures/10000001000003010000028E9E06D5BB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7">
          <table:table-cell table:number-columns-repeated="6"/>
        </table:table-row>
        <table:table-row table:style-name="ro1">
          <table:table-cell>
            <draw:frame draw:z-index="2" draw:name="Image 9" draw:style-name="gr1" draw:text-style-name="P1" svg:width="12.897cm" svg:height="10.582cm" svg:x="0.325cm" svg:y="0.112cm">
              <draw:image xlink:href="Pictures/10000001000003010000028E5A14C382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table table:name="for eachs" table:style-name="ta1">
        <table:table-column table:style-name="co3" table:number-columns-repeated="7" table:default-cell-style-name="Default"/>
        <table:table-row table:style-name="ro1">
          <table:table-cell>
            <draw:frame draw:z-index="0" draw:name="Image 10" draw:style-name="gr1" draw:text-style-name="P1" svg:width="13.693cm" svg:height="9.174cm" svg:x="0cm" svg:y="0cm">
              <draw:image xlink:href="Pictures/10000001000002FE000002142709121E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" draw:name="Image 11" draw:style-name="gr1" draw:text-style-name="P1" svg:width="8.963cm" svg:height="6.498cm" svg:x="0.484cm" svg:y="0.195cm">
              <draw:image xlink:href="Pictures/10000001000001E30000016B35C66A1C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routes and express" table:style-name="ta1">
        <table:table-column table:style-name="co3" table:default-cell-style-name="Default"/>
        <table:table-row table:style-name="ro1" table:number-rows-repeated="3">
          <table:table-cell/>
        </table:table-row>
        <table:table-row table:style-name="ro1">
          <table:table-cell>
            <draw:frame draw:z-index="0" draw:name="Image 13" draw:style-name="gr1" draw:text-style-name="P1" svg:width="21.145cm" svg:height="8.658cm" svg:x="0.926cm" svg:y="0.066cm">
              <draw:image xlink:href="Pictures/100000010000030000000146AB2A39D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8">
          <table:table-cell/>
        </table:table-row>
        <table:table-row table:style-name="ro1">
          <table:table-cell>
            <draw:frame draw:z-index="1" draw:name="Image 14" draw:style-name="gr1" draw:text-style-name="P1" svg:width="21.489cm" svg:height="14.675cm" svg:x="0.455cm" svg:y="0.42cm">
              <draw:image xlink:href="Pictures/100000010000040A000002DCF89927CE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lint" table:style-name="ta1">
        <table:table-column table:style-name="co7" table:default-cell-style-name="Default"/>
        <table:table-row table:style-name="ro1">
          <table:table-cell office:value-type="string" calcext:value-type="string">
            <text:p>try to use the airbnb lint struc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22:00:00.4662618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4:19:48.740292315</meta:creation-date>
    <dc:date>2026-04-27T22:00:33.488987997</dc:date>
    <meta:editing-duration>PT2H23M29S</meta:editing-duration>
    <meta:editing-cycles>19</meta:editing-cycles>
    <meta:generator>LibreOffice/24.2.7.2$Linux_X86_64 LibreOffice_project/420$Build-2</meta:generator>
    <meta:document-statistic meta:table-count="13" meta:cell-count="20" meta:object-count="14"/>
  </office:meta>
</office:document-meta>
</file>
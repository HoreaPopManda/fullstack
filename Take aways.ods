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A900000130B9342FBB.png" manifest:media-type="image/png"/>
  <manifest:file-entry manifest:full-path="Pictures/10000001000004B8000003084A920E11.png" manifest:media-type="image/png"/>
  <manifest:file-entry manifest:full-path="Pictures/10000001000002C5000002CEF4170A88.png" manifest:media-type="image/png"/>
  <manifest:file-entry manifest:full-path="Pictures/100000010000040A000002DCF89927CE.png" manifest:media-type="image/png"/>
  <manifest:file-entry manifest:full-path="Pictures/100000010000030E0000027DE7109C32.png" manifest:media-type="image/png"/>
  <manifest:file-entry manifest:full-path="Pictures/10000001000003010000028E5A14C382.png" manifest:media-type="image/png"/>
  <manifest:file-entry manifest:full-path="Pictures/1000000100000332000000FEF9588B4F.png" manifest:media-type="image/png"/>
  <manifest:file-entry manifest:full-path="Pictures/10000001000001E2000001E7D1D733C4.png" manifest:media-type="image/png"/>
  <manifest:file-entry manifest:full-path="Pictures/10000001000003680000038C0E4153E3.png" manifest:media-type="image/png"/>
  <manifest:file-entry manifest:full-path="Pictures/10000001000002CC0000016B5C8AC0A2.png" manifest:media-type="image/png"/>
  <manifest:file-entry manifest:full-path="Pictures/10000001000002C900000148CC596526.png" manifest:media-type="image/png"/>
  <manifest:file-entry manifest:full-path="Pictures/10000001000002A7000001BCFA4F7A8B.png" manifest:media-type="image/png"/>
  <manifest:file-entry manifest:full-path="Pictures/1000000100000304000002D8E055EF69.png" manifest:media-type="image/png"/>
  <manifest:file-entry manifest:full-path="Pictures/100000010000031D00000213EC3F5CD5.png" manifest:media-type="image/png"/>
  <manifest:file-entry manifest:full-path="Pictures/10000001000003010000028E9E06D5BB.png" manifest:media-type="image/png"/>
  <manifest:file-entry manifest:full-path="Pictures/10000001000002FE000002142709121E.png" manifest:media-type="image/png"/>
  <manifest:file-entry manifest:full-path="Pictures/10000001000001E30000016B35C66A1C.png" manifest:media-type="image/png"/>
  <manifest:file-entry manifest:full-path="Pictures/100000010000030000000146AB2A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22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3.9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82cm"/>
    </style:style>
    <style:style style:name="co6" style:family="table-column">
      <style:table-column-properties fo:break-before="auto" style:column-width="11.737cm"/>
    </style:style>
    <style:style style:name="co7" style:family="table-column">
      <style:table-column-properties fo:break-before="auto" style:column-width="8.867cm"/>
    </style:style>
    <style:style style:name="co8" style:family="table-column">
      <style:table-column-properties fo:break-before="auto" style:column-width="4.835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5.403cm"/>
    </style:style>
    <style:style style:name="co11" style:family="table-column">
      <style:table-column-properties fo:break-before="auto" style:column-width="11.673cm"/>
    </style:style>
    <style:style style:name="co12" style:family="table-column">
      <style:table-column-properties fo:break-before="auto" style:column-width="5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m in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mong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doten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c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eslint @eslint/js –save-de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x eslint –init</text:p>
          </table:table-cell>
          <table:table-cell office:value-type="string" calcext:value-type="string">
            <text:p>has a menu</text:p>
          </table:table-cell>
          <table:table-cell office:value-type="string" calcext:value-type="string">
            <text:p>generates the eslint file</text:p>
          </table:table-cell>
        </table:table-row>
        <table:table-row table:style-name="ro1">
          <table:table-cell office:value-type="string" calcext:value-type="string">
            <text:p>npm i --save lod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cross-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--save-dev super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.js</text:p>
          </table:table-cell>
          <table:table-cell office:value-type="string" calcext:value-type="string">
            <text:p>new mongoose.Schema</text:p>
          </table:table-cell>
        </table:table-row>
        <table:table-row table:style-name="ro1">
          <table:table-cell office:value-type="string" calcext:value-type="string">
            <text:p>controll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s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i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logger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middleware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is different </text:p>
          </table:table-cell>
          <table:table-cell/>
        </table:table-row>
        <table:table-row table:style-name="ro1">
          <table:table-cell office:value-type="string" calcext:value-type="string">
            <text:p>index.js</text:p>
          </table:table-cell>
          <table:table-cell/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table:style-name="ce1" office:value-type="string" calcext:value-type="string">
            <text:p>app.listen (port)</text:p>
          </table:table-cell>
          <table:table-cell/>
        </table:table-row>
      </table:table>
      <table:table table:name="VS Code Extension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7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4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4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epl" table:style-name="ta1">
        <table:table-column table:style-name="co4" table:default-cell-style-name="Default"/>
        <table:table-row table:style-name="ro1">
          <table:table-cell>
            <draw:frame draw:z-index="0" draw:name="Image 12" draw:style-name="gr1" draw:text-style-name="P1" svg:width="22.522cm" svg:height="6.746cm" svg:x="0cm" svg:y="0cm">
              <draw:image xlink:href="Pictures/1000000100000332000000FEF9588B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ools" table:style-name="ta1">
        <table:table-column table:style-name="co8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  <table:table-row table:style-name="ro2">
          <table:table-cell table:style-name="ce1" office:value-type="string" calcext:value-type="string">
            <text:p>error-tracking system like <text:a xlink:href="https://sentry.io/welcome/" xlink:type="simple">Sentry</text:a></text:p>
          </table:table-cell>
        </table:table-row>
      </table:table>
      <table:table table:name="destructuring" table:style-name="ta1">
        <table:table-column table:style-name="co4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4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4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outes and express" table:style-name="ta1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 13" draw:style-name="gr1" draw:text-style-name="P1" svg:width="21.145cm" svg:height="8.658cm" svg:x="0.926cm" svg:y="0.066cm">
              <draw:image xlink:href="Pictures/100000010000030000000146AB2A39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/>
        </table:table-row>
        <table:table-row table:style-name="ro1">
          <table:table-cell>
            <draw:frame draw:z-index="1" draw:name="Image 14" draw:style-name="gr1" draw:text-style-name="P1" svg:width="21.489cm" svg:height="14.675cm" svg:x="0.455cm" svg:y="0.42cm">
              <draw:image xlink:href="Pictures/100000010000040A000002DCF89927CE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lint" table:style-name="ta1">
        <table:table-column table:style-name="co10" table:default-cell-style-name="Default"/>
        <table:table-row table:style-name="ro1">
          <table:table-cell office:value-type="string" calcext:value-type="string">
            <text:p>try to use the airbnb lint structure</text:p>
          </table:table-cell>
        </table:table-row>
      </table:table>
      <table:table table:name="asynch" table:style-name="ta1">
        <table:table-column table:style-name="co11" table:default-cell-style-name="Default"/>
        <table:table-row table:style-name="ro1">
          <table:table-cell office:value-type="string" calcext:value-type="string">
            <text:p>Promises is an obj with methods then() and catch()</text:p>
          </table:table-cell>
        </table:table-row>
        <table:table-row table:style-name="ro1">
          <table:table-cell office:value-type="string" calcext:value-type="string">
            <text:p>then takes a param as a function, not just code.</text:p>
          </table:table-cell>
        </table:table-row>
        <table:table-row table:style-name="ro1">
          <table:table-cell office:value-type="string" calcext:value-type="string">
            <text:p>then (console.log(“OK”) is not working, should be then (()=&gt; {})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0" draw:name="Image 15" draw:style-name="gr1" draw:text-style-name="P1" svg:width="14.01cm" svg:height="9.02cm" svg:x="0.945cm" svg:y="0.341cm">
              <draw:image xlink:href="Pictures/100000010000031D00000213EC3F5CD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2">
          <table:table-cell/>
        </table:table-row>
        <table:table-row table:style-name="ro1">
          <table:table-cell>
            <draw:frame draw:z-index="2" draw:name="Image 16" draw:style-name="gr1" draw:text-style-name="P1" svg:width="19.481cm" svg:height="19.07cm" svg:x="0cm" svg:y="0cm">
              <draw:image xlink:href="Pictures/10000001000002C5000002CEF4170A8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6">
          <table:table-cell/>
        </table:table-row>
        <table:table-row table:style-name="ro1">
          <table:table-cell table:style-name="ce1" office:value-type="string" calcext:value-type="string">
            <text:p>async function are “executed” even when they are not finished. Think progress.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1" draw:name="Image 17" draw:style-name="gr1" draw:text-style-name="P1" svg:width="18.938cm" svg:height="11.755cm" svg:x="0.451cm" svg:y="0.291cm">
              <draw:image xlink:href="Pictures/10000001000004B8000003084A920E1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/>
        </table:table-row>
        <table:table-row table:style-name="ro1">
          <table:table-cell>
            <draw:frame draw:z-index="3" draw:name="Image 18" draw:style-name="gr1" draw:text-style-name="P1" svg:width="25.746cm" svg:height="8.074cm" svg:x="1.25cm" svg:y="0.178cm">
              <draw:image xlink:href="Pictures/10000001000003A900000130B9342FB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promises" table:style-name="ta1">
        <table:table-column table:style-name="co12" table:default-cell-style-name="ce1"/>
        <table:table-row table:style-name="ro1">
          <table:table-cell office:value-type="string" calcext:value-type="string">
            <text:p>await Promise.all(promiseArra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22:08:02.120227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6-14T22:22:13.075571939</dc:date>
    <meta:editing-duration>PT5H42M19S</meta:editing-duration>
    <meta:editing-cycles>33</meta:editing-cycles>
    <meta:generator>LibreOffice/24.2.7.2$Linux_X86_64 LibreOffice_project/420$Build-2</meta:generator>
    <meta:document-statistic meta:table-count="16" meta:cell-count="53" meta:object-count="18"/>
  </office:meta>
</office:document-meta>
</file>